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7f2b" officeooo:paragraph-rsid="00007f2b"/>
    </style:style>
    <style:style style:name="P2" style:family="paragraph" style:parent-style-name="Standard">
      <style:paragraph-properties fo:text-align="start" style:justify-single-word="false"/>
      <style:text-properties officeooo:rsid="00007f2b" officeooo:paragraph-rsid="00007f2b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07f2b" officeooo:paragraph-rsid="000160f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 AUSTRALIA GOO GHOUL TRADEMARK<text:line-break/></text:p>
      <text:p text:style-name="P1"/>
      <text:p text:style-name="P2">Class 3:</text:p>
      <text:p text:style-name="P2"/>
      <text:list text:style-name="L1">
        <text:list-item>
          <text:p text:style-name="P3">cleaning, washing and polishing preparations; </text:p>
        </text:list-item>
        <text:list-item>
          <text:p text:style-name="P3">cleaning products; </text:p>
        </text:list-item>
        <text:list-item>
          <text:p text:style-name="P3">cleaning preparations for household purposes; </text:p>
        </text:list-item>
        <text:list-item>
          <text:p text:style-name="P3">cleaning preparations for shoes; cleaning preparations for bathroom use; </text:p>
        </text:list-item>
        <text:list-item>
          <text:p text:style-name="P3">cleaning sprays; </text:p>
        </text:list-item>
        <text:list-item>
          <text:p text:style-name="P3">preparations for cleaning precious metals; </text:p>
        </text:list-item>
        <text:list-item>
          <text:p text:style-name="P3">preparations for the care and cleaning of animals; </text:p>
        </text:list-item>
        <text:list-item>
          <text:p text:style-name="P3">preparations for cleaning porcelain; </text:p>
        </text:list-item>
        <text:list-item>
          <text:p text:style-name="P3">cleaning, polishing and scouring preparations; </text:p>
        </text:list-item>
        <text:list-item>
          <text:p text:style-name="P3">cleaning agents; </text:p>
        </text:list-item>
        <text:list-item>
          <text:p text:style-name="P3">cleaning substances for household purposes; </text:p>
        </text:list-item>
        <text:list-item>
          <text:p text:style-name="P3">hand cleaning preparations; </text:p>
        </text:list-item>
        <text:list-item>
          <text:p text:style-name="P3">cleaning preparations for plant leaves; </text:p>
        </text:list-item>
        <text:list-item>
          <text:p text:style-name="P3">cleaning agents for the hands; </text:p>
        </text:list-item>
        <text:list-item>
          <text:p text:style-name="P3">carpet cleaning preparations; </text:p>
        </text:list-item>
        <text:list-item>
          <text:p text:style-name="P3">cleaning preparations for use on silverware; </text:p>
        </text:list-item>
        <text:list-item>
          <text:p text:style-name="P3">all-purpose cleaners; </text:p>
        </text:list-item>
        <text:list-item>
          <text:p text:style-name="P3">volcanic ash for cleaning; </text:p>
        </text:list-item>
        <text:list-item>
          <text:p text:style-name="P3">oils for cleaning purposes; </text:p>
        </text:list-item>
        <text:list-item>
          <text:p text:style-name="P3">cleaning products for use on vehicles; </text:p>
        </text:list-item>
        <text:list-item>
          <text:p text:style-name="P3">cleaning and washing preparations and substances; </text:p>
        </text:list-item>
        <text:list-item>
          <text:p text:style-name="P3">cleaning preparations; </text:p>
        </text:list-item>
        <text:list-item>
          <text:p text:style-name="P3">cleaning and polishing preparations; </text:p>
        </text:list-item>
        <text:list-item>
          <text:p text:style-name="P3">cleaning fluids; </text:p>
        </text:list-item>
        <text:list-item>
          <text:p text:style-name="P3">cleaning preparations for household use; </text:p>
        </text:list-item>
        <text:list-item>
          <text:p text:style-name="P3">household cleaning preparations; </text:p>
        </text:list-item>
        <text:list-item>
          <text:p text:style-name="P3">cleaning preparations for use on floors; </text:p>
        </text:list-item>
        <text:list-item>
          <text:p text:style-name="P3">cleaning preparations for use on shoes; </text:p>
        </text:list-item>
        <text:list-item>
          <text:p text:style-name="P3">bathroom cleaning preparations; </text:p>
        </text:list-item>
        <text:list-item>
          <text:p text:style-name="P3">cleaning preparations for wood; </text:p>
        </text:list-item>
        <text:list-item>
          <text:p text:style-name="P3">cleaning preparations for floors; </text:p>
        </text:list-item>
        <text:list-item>
          <text:p text:style-name="P3">preparations for cleaning floors; </text:p>
        </text:list-item>
        <text:list-item>
          <text:p text:style-name="P3">preparations for cleaning shoes; </text:p>
        </text:list-item>
        <text:list-item>
          <text:p text:style-name="P3">all purpose cleaning preparations; </text:p>
        </text:list-item>
        <text:list-item>
          <text:p text:style-name="P3">washing soda, for cleaning; </text:p>
        </text:list-item>
        <text:list-item>
          <text:p text:style-name="P3">cleaning preparations for water closets; </text:p>
        </text:list-item>
        <text:list-item>
          <text:p text:style-name="P3">cleaning preparations for wash-hand basins; </text:p>
        </text:list-item>
        <text:list-item>
          <text:p text:style-name="P3">cleaning preparations for textiles; </text:p>
        </text:list-item>
        <text:list-item>
          <text:p text:style-name="P3">cleaning, polishing and abrasive preparations; </text:p>
        </text:list-item>
        <text:list-item>
          <text:p text:style-name="P3">cleaning sprays for household purposes; </text:p>
        </text:list-item>
        <text:list-item>
          <text:p text:style-name="P3">cleaning preparations for dishes; </text:p>
        </text:list-item>
        <text:list-item>
          <text:p text:style-name="P3">cleaning preparations for wash basins; </text:p>
        </text:list-item>
        <text:list-item>
          <text:p text:style-name="P3">cleaning preparations for footwear; </text:p>
        </text:list-item>
        <text:list-item>
          <text:p text:style-name="P3">preparations for stripping and cleaning floors; </text:p>
        </text:list-item>
        <text:list-item>
          <text:p text:style-name="P3">cleaning preparations for upholstery; </text:p>
        </text:list-item>
        <text:list-item>
          <text:p text:style-name="P3">all-purpose cleaning preparations; </text:p>
        </text:list-item>
        <text:list-item>
          <text:p text:style-name="P3">household cleaning products; </text:p>
        </text:list-item>
        <text:list-item>
          <text:p text:style-name="P3"><text:soft-page-break/>preparations for cleaning paintwork; </text:p>
        </text:list-item>
        <text:list-item>
          <text:p text:style-name="P3">preparations for cleaning wood; </text:p>
        </text:list-item>
        <text:list-item>
          <text:p text:style-name="P3">preparations for cleaning footwear; </text:p>
        </text:list-item>
        <text:list-item>
          <text:p text:style-name="P3">cleaning preparations for wash-hand bowls; </text:p>
        </text:list-item>
        <text:list-item>
          <text:p text:style-name="P3">cleaning substances for household use; </text:p>
        </text:list-item>
        <text:list-item>
          <text:p text:style-name="P3">cleaning agents for household purposes; </text:p>
        </text:list-item>
        <text:list-item>
          <text:p text:style-name="P3">cleaning, polishing, degreasing and abrasive products for household purposes; </text:p>
        </text:list-item>
        <text:list-item>
          <text:p text:style-name="P3">cleaning preparations for sanitary ware; </text:p>
        </text:list-item>
        <text:list-item>
          <text:p text:style-name="P3">preparations for cleaning surfaces; </text:p>
        </text:list-item>
        <text:list-item>
          <text:p text:style-name="P3">cleaning preparations for baths; </text:p>
        </text:list-item>
        <text:list-item>
          <text:p text:style-name="P3">cleaning preparations for fabrics; </text:p>
        </text:list-item>
        <text:list-item>
          <text:p text:style-name="P3">odour removing products being cleaning products; </text:p>
        </text:list-item>
        <text:list-item>
          <text:p text:style-name="P3">cleaning preparations for tiles; </text:p>
        </text:list-item>
        <text:list-item>
          <text:p text:style-name="P3">preparations for cleaning textiles; </text:p>
        </text:list-item>
        <text:list-item>
          <text:p text:style-name="P3">cleaning, scouring and polishing preparations and substances; </text:p>
        </text:list-item>
        <text:list-item>
          <text:p text:style-name="P3">ammonia for cleaning purposes; </text:p>
        </text:list-item>
        <text:list-item>
          <text:p text:style-name="P3">odor removing preparations being cleaning preparations; </text:p>
        </text:list-item>
        <text:list-item>
          <text:p text:style-name="P3">dry-cleaning preparations; </text:p>
        </text:list-item>
        <text:list-item>
          <text:p text:style-name="P3">hand cleaners [hand cleaning preparations]; </text:p>
        </text:list-item>
        <text:list-item>
          <text:p text:style-name="P3">dry cleaning preparations; </text:p>
        </text:list-item>
        <text:list-item>
          <text:p text:style-name="P3">cleaning preparations for leather; </text:p>
        </text:list-item>
        <text:list-item>
          <text:p text:style-name="P3">cleaning, polishing, degreasing and abrasive products for household use; </text:p>
        </text:list-item>
        <text:list-item>
          <text:p text:style-name="P3">preparations for cleaning jewelry; </text:p>
        </text:list-item>
        <text:list-item>
          <text:p text:style-name="P3">odour removing products [cleaning products]; </text:p>
        </text:list-item>
        <text:list-item>
          <text:p text:style-name="P3">degreasing products for cleaning purposes; </text:p>
        </text:list-item>
        <text:list-item>
          <text:p text:style-name="P3">odor removing products being cleaning products; </text:p>
        </text:list-item>
        <text:list-item>
          <text:p text:style-name="P3">cleaning preparations for paintwork; </text:p>
        </text:list-item>
        <text:list-item>
          <text:p text:style-name="P3">cleaning preparations for windows; </text:p>
        </text:list-item>
        <text:list-item>
          <text:p text:style-name="P3">cleaning agents and preparations; </text:p>
        </text:list-item>
        <text:list-item>
          <text:p text:style-name="P3">grease-removing products for cleaning purposes; </text:p>
        </text:list-item>
        <text:list-item>
          <text:p text:style-name="P3">cleaning sprays for household use; </text:p>
        </text:list-item>
        <text:list-item>
          <text:p text:style-name="P3">cleaning, polishing, degreasing and abrasive preparations for household purposes; </text:p>
        </text:list-item>
        <text:list-item>
          <text:p text:style-name="P3">cleaning, polishing, scouring and abrasive preparations; </text:p>
        </text:list-item>
        <text:list-item>
          <text:p text:style-name="P3">cleaning, polishing, degreasing and abrasive preparations for household use; </text:p>
        </text:list-item>
        <text:list-item>
          <text:p text:style-name="P3">preparations for cleaning windows; </text:p>
        </text:list-item>
        <text:list-item>
          <text:p text:style-name="P3">cleansing and polishing preparations; </text:p>
        </text:list-item>
        <text:list-item>
          <text:p text:style-name="P3">preparations for cleaning sanitary ware; </text:p>
        </text:list-item>
        <text:list-item>
          <text:p text:style-name="P3">preparations for cleaning baths; </text:p>
        </text:list-item>
        <text:list-item>
          <text:p text:style-name="P3">cleaning, scouring and abrasive preparations; </text:p>
        </text:list-item>
        <text:list-item>
          <text:p text:style-name="P3">preparations for cleaning wash-hand basins; </text:p>
        </text:list-item>
        <text:list-item>
          <text:p text:style-name="P3">cleaning chalk; </text:p>
        </text:list-item>
        <text:list-item>
          <text:p text:style-name="P3">cleaning preparations for use on jewelry; </text:p>
        </text:list-item>
        <text:list-item>
          <text:p text:style-name="P3">preparations for cleaning leather; </text:p>
        </text:list-item>
        <text:list-item>
          <text:p text:style-name="P3">cleaning, polishing, degreasing and abrasive preparations; </text:p>
        </text:list-item>
        <text:list-item>
          <text:p text:style-name="P3">cleaning preparations for use on tiles; </text:p>
        </text:list-item>
        <text:list-item>
          <text:p text:style-name="P3">cleaning preparations for toilets [water-closets]; </text:p>
        </text:list-item>
        <text:list-item>
          <text:p text:style-name="P3">grease-removing preparations for cleaning purposes; </text:p>
        </text:list-item>
        <text:list-item>
          <text:p text:style-name="P3">preparations for cleaning water closets; </text:p>
        </text:list-item>
        <text:list-item>
          <text:p text:style-name="P3">floor stripping and cleaning preparations; </text:p>
        </text:list-item>
        <text:list-item>
          <text:p text:style-name="P3">cleaning preparations for the hands; </text:p>
        </text:list-item>
        <text:list-item>
          <text:p text:style-name="P3">cleaning preparations for use on leather; </text:p>
        </text:list-item>
        <text:list-item>
          <text:p text:style-name="P3">preparations for cleaning wash-hand bowls; </text:p>
        </text:list-item>
        <text:list-item>
          <text:p text:style-name="P3"><text:soft-page-break/>cleaning and fragrancing preparations; </text:p>
        </text:list-item>
        <text:list-item>
          <text:p text:style-name="P3">cleaning products for use on tiles; </text:p>
        </text:list-item>
        <text:list-item>
          <text:p text:style-name="P3">odour removing preparations being cleaning preparations; </text:p>
        </text:list-item>
        <text:list-item>
          <text:p text:style-name="P3">cleaning preparations for porcelain; </text:p>
        </text:list-item>
        <text:list-item>
          <text:p text:style-name="P3">cleaning preparations for upholstery fabrics; </text:p>
        </text:list-item>
        <text:list-item>
          <text:p text:style-name="P3">preparations for cleaning wash basins; </text:p>
        </text:list-item>
        <text:list-item>
          <text:p text:style-name="P3">wallpaper cleaning preparations; </text:p>
        </text:list-item>
        <text:list-item>
          <text:p text:style-name="P3">degreasing preparations for cleaning purposes; </text:p>
        </text:list-item>
        <text:list-item>
          <text:p text:style-name="P3">odor removing preparations [cleaning preparations]; </text:p>
        </text:list-item>
        <text:list-item>
          <text:p text:style-name="P3">rug cleaning preparations; </text:p>
        </text:list-item>
        <text:list-item>
          <text:p text:style-name="P3">preparations for cleaning tiles; </text:p>
        </text:list-item>
        <text:list-item>
          <text:p text:style-name="P3">odour removing preparations [cleaning preparations]; </text:p>
        </text:list-item>
        <text:list-item>
          <text:p text:style-name="P3">preparations for use in cleaning upholstery; </text:p>
        </text:list-item>
        <text:list-item>
          <text:p text:style-name="P3">odor removing products [cleaning products]; </text:p>
        </text:list-item>
        <text:list-item>
          <text:p text:style-name="P3">hand cleaners; </text:p>
        </text:list-item>
        <text:list-item>
          <text:p text:style-name="P3">cleaning preparations for drain pipes; </text:p>
        </text:list-item>
        <text:list-item>
          <text:p text:style-name="P3">cleaning and polishing preparations for leather and shoes; </text:p>
        </text:list-item>
        <text:list-item>
          <text:p text:style-name="P3">preparations for cleaning jewellery; </text:p>
        </text:list-item>
        <text:list-item>
          <text:p text:style-name="P3">cleaning preparations for removing insects; </text:p>
        </text:list-item>
        <text:list-item>
          <text:p text:style-name="P3">domestic cleaning preparations; </text:p>
        </text:list-item>
        <text:list-item>
          <text:p text:style-name="P3">cleaning preparations for use on jewellery; </text:p>
        </text:list-item>
        <text:list-item>
          <text:p text:style-name="P3">cleaning and fragrancing preparations, other than for personal use; </text:p>
        </text:list-item>
        <text:list-item>
          <text:p text:style-name="P3">floor cleaning preparations; </text:p>
        </text:list-item>
        <text:list-item>
          <text:p text:style-name="P3">bleach for use in cleaning; </text:p>
        </text:list-item>
        <text:list-item>
          <text:p text:style-name="P3">cleaning sprays for textiles; </text:p>
        </text:list-item>
        <text:list-item>
          <text:p text:style-name="P3">cleaning products with disinfectant properties; </text:p>
        </text:list-item>
        <text:list-item>
          <text:p text:style-name="P3">cleaning oils; cleaning preparations for cars; </text:p>
        </text:list-item>
        <text:list-item>
          <text:p text:style-name="P3">cleaners for upholstery fabrics; </text:p>
        </text:list-item>
        <text:list-item>
          <text:p text:style-name="P3">cleansers for household purposes; </text:p>
        </text:list-item>
        <text:list-item>
          <text:p text:style-name="P3">cleaning preparations for silverware; </text:p>
        </text:list-item>
        <text:list-item>
          <text:p text:style-name="P3">household cleansers; </text:p>
        </text:list-item>
        <text:list-item>
          <text:p text:style-name="P3">degreasers for cleaning purposes; </text:p>
        </text:list-item>
        <text:list-item>
          <text:p text:style-name="P3">preparations for cleaning and polishing leather and shoes; </text:p>
        </text:list-item>
        <text:list-item>
          <text:p text:style-name="P3">cleaning and fragrancing products, other than for personal use; </text:p>
        </text:list-item>
        <text:list-item>
          <text:p text:style-name="P3">dry-cleaning fluids; preparations for cleaning metal; </text:p>
        </text:list-item>
        <text:list-item>
          <text:p text:style-name="P3">cleaning preparations for lavatories; </text:p>
        </text:list-item>
        <text:list-item>
          <text:p text:style-name="P3">cleaning foams; upholstery cleaning preparations; </text:p>
        </text:list-item>
        <text:list-item>
          <text:p text:style-name="P3">wipes impregnated with cleaning preparations; </text:p>
        </text:list-item>
        <text:list-item>
          <text:p text:style-name="P3">drain cleaning preparations; </text:p>
        </text:list-item>
        <text:list-item>
          <text:p text:style-name="P3">preparations for cleaning toilets [water-closets]; </text:p>
        </text:list-item>
        <text:list-item>
          <text:p text:style-name="P3">cleaning preparations for use on precious metals; </text:p>
        </text:list-item>
        <text:list-item>
          <text:p text:style-name="P3">cleaning foam; preparations for cleaning silverware; </text:p>
        </text:list-item>
        <text:list-item>
          <text:p text:style-name="P3">cleaning preparations with disinfectant properties; </text:p>
        </text:list-item>
        <text:list-item>
          <text:p text:style-name="P3">cleaning compositions for removing stains; </text:p>
        </text:list-item>
        <text:list-item>
          <text:p text:style-name="P3">cleaning preparations for smokers' articles; </text:p>
        </text:list-item>
        <text:list-item>
          <text:p text:style-name="P3">chemical cleaning preparations for household purposes; </text:p>
        </text:list-item>
        <text:list-item>
          <text:p text:style-name="P3">cleaning preparations for metal; </text:p>
        </text:list-item>
        <text:list-item>
          <text:p text:style-name="P3">cleaning preparations for glass; </text:p>
        </text:list-item>
        <text:list-item>
          <text:p text:style-name="P3">shoe cleaning and polishing preparations; </text:p>
        </text:list-item>
        <text:list-item>
          <text:p text:style-name="P3">cleaning sprays for use on textiles; </text:p>
        </text:list-item>
        <text:list-item>
          <text:p text:style-name="P3">cleaning preparations with a solvent base; </text:p>
        </text:list-item>
        <text:list-item>
          <text:p text:style-name="P3">cleansers for household use; </text:p>
        </text:list-item>
        <text:list-item>
          <text:p text:style-name="P3"><text:soft-page-break/>cleaning solvents, other than for use in manufacturing processes; </text:p>
        </text:list-item>
        <text:list-item>
          <text:p text:style-name="P3">cleaning products for gilt; leather cleaning and polishing preparations; </text:p>
        </text:list-item>
        <text:list-item>
          <text:p text:style-name="P3">dry cleaning fluids; </text:p>
        </text:list-item>
        <text:list-item>
          <text:p text:style-name="P3">cleaning preparations for use in photography; </text:p>
        </text:list-item>
        <text:list-item>
          <text:p text:style-name="P3">pre-moistened wipes with cleaning preparations for household purposes; </text:p>
        </text:list-item>
        <text:list-item>
          <text:p text:style-name="P3">laundry detergents for household cleaning use; </text:p>
        </text:list-item>
        <text:list-item>
          <text:p text:style-name="P3">cleaning preparations for use on brickworks; </text:p>
        </text:list-item>
        <text:list-item>
          <text:p text:style-name="P3">cleaning preparations for brickworks; </text:p>
        </text:list-item>
        <text:list-item>
          <text:p text:style-name="P3">starch for cleaning purpose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18:15:46.740305700</meta:creation-date>
    <dc:date>2025-11-28T01:25:44.219835500</dc:date>
    <meta:editing-duration>PT1H25M13S</meta:editing-duration>
    <meta:editing-cycles>1</meta:editing-cycles>
    <meta:document-statistic meta:table-count="0" meta:image-count="0" meta:object-count="0" meta:page-count="4" meta:paragraph-count="162" meta:word-count="943" meta:character-count="6755" meta:non-whitespace-character-count="5973"/>
    <meta:generator>LibreOffice/25.8.1.1$Windows_X86_64 LibreOffice_project/54047653041915e595ad4e45cccea684809c77b5</meta:generator>
  </office:meta>
</office:document-meta>
</file>